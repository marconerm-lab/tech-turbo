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thropic Sans" svg:font-family="'Anthropic Sans', system-ui, 'Segoe UI', Robo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115d" officeooo:paragraph-rsid="0019115d"/>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Standard">
      <style:paragraph-properties fo:margin-left="0cm" fo:margin-right="0cm" fo:orphans="2" fo:widows="2" fo:text-indent="0cm" style:auto-text-indent="false"/>
      <style:text-properties fo:font-variant="normal" fo:text-transform="none" fo:color="#121212" loext:opacity="100%" style:font-name="Anthropic Sans" fo:font-size="12pt" fo:letter-spacing="normal" fo:font-style="normal" fo:font-weight="bold"/>
    </style:style>
    <style:style style:name="P7" style:family="paragraph" style:parent-style-name="Standard">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fo:padding="0cm" fo:border="none"/>
    </style:style>
    <style:style style:name="P9"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list-style-name="L3">
      <style:paragraph-properties fo:margin-left="0cm" fo:margin-right="0cm" fo:text-indent="0cm" style:auto-text-indent="false" fo:padding="0cm" fo:border="none"/>
    </style:style>
    <style:style style:name="P11" style:family="paragraph" style:parent-style-name="Text_20_body">
      <style:paragraph-properties fo:margin-left="0cm" fo:margin-right="0cm" fo:text-indent="0cm" style:auto-text-indent="false" fo:padding="0cm" fo:border="none"/>
    </style:style>
    <style:style style:name="P12" style:family="paragraph" style:parent-style-name="Standard">
      <style:paragraph-properties fo:margin-left="0cm" fo:margin-right="0cm" fo:orphans="2" fo:widows="2" fo:text-indent="0cm" style:auto-text-indent="false"/>
      <style:text-properties officeooo:rsid="001d7ee9" officeooo:paragraph-rsid="001d7ee9"/>
    </style:style>
    <style:style style:name="P13" style:family="paragraph" style:parent-style-name="Standard">
      <style:paragraph-properties fo:margin-left="0cm" fo:margin-right="0cm" fo:orphans="2" fo:widows="2" fo:text-indent="0cm" style:auto-text-indent="false"/>
      <style:text-properties officeooo:rsid="001e1d29" officeooo:paragraph-rsid="001e1d29"/>
    </style:style>
    <style:style style:name="P14" style:family="paragraph" style:parent-style-name="Text_20_body">
      <style:paragraph-properties fo:margin-left="0cm" fo:margin-right="0cm" fo:orphans="2" fo:widows="2" fo:text-indent="0cm" style:auto-text-indent="false"/>
      <style:text-properties officeooo:rsid="001e1d29" officeooo:paragraph-rsid="001e1d29"/>
    </style:style>
    <style:style style:name="P15" style:family="paragraph" style:parent-style-name="Text_20_body">
      <style:paragraph-properties fo:margin-left="0cm" fo:margin-right="0cm" fo:orphans="2" fo:widows="2" fo:text-indent="0cm" style:auto-text-indent="false"/>
      <style:text-properties fo:font-variant="normal" fo:text-transform="none" fo:color="#121212" loext:opacity="100%" style:font-name="Anthropic Sans" fo:font-size="12pt" fo:letter-spacing="normal" fo:font-style="normal" fo:font-weight="bold" officeooo:rsid="001e1d29" officeooo:paragraph-rsid="001e1d29"/>
    </style:style>
    <style:style style:name="P16" style:family="paragraph" style:parent-style-name="Text_20_body">
      <style:paragraph-properties fo:margin-left="0cm" fo:margin-right="0cm" fo:orphans="2" fo:widows="2" fo:text-indent="0cm" style:auto-text-indent="false"/>
      <style:text-properties officeooo:rsid="001e1d29" officeooo:paragraph-rsid="00219045"/>
    </style:style>
    <style:style style:name="P17" style:family="paragraph" style:parent-style-name="Text_20_body" style:list-style-name="L4">
      <style:paragraph-properties fo:margin-top="0cm" fo:margin-bottom="0cm" style:contextual-spacing="false"/>
      <style:text-properties officeooo:rsid="001e1d29"/>
    </style:style>
    <style:style style:name="P18" style:family="paragraph" style:parent-style-name="Text_20_body" style:list-style-name="L4">
      <style:text-properties officeooo:rsid="001e1d29"/>
    </style:style>
    <style:style style:name="P19" style:family="paragraph" style:parent-style-name="Text_20_body">
      <style:text-properties officeooo:rsid="001e1d29"/>
    </style:style>
    <style:style style:name="P20" style:family="paragraph" style:parent-style-name="Text_20_body" style:list-style-name="L5">
      <style:paragraph-properties fo:margin-top="0cm" fo:margin-bottom="0cm" style:contextual-spacing="false"/>
      <style:text-properties officeooo:rsid="001e1d29"/>
    </style:style>
    <style:style style:name="P21" style:family="paragraph" style:parent-style-name="Text_20_body" style:list-style-name="L5">
      <style:text-properties officeooo:rsid="001e1d29"/>
    </style:style>
    <style:style style:name="P22" style:family="paragraph" style:parent-style-name="Horizontal_20_Line">
      <style:text-properties officeooo:rsid="001e1d29"/>
    </style:style>
    <style:style style:name="P23" style:family="paragraph" style:parent-style-name="Heading_20_1">
      <style:text-properties officeooo:rsid="001e1d29"/>
    </style:style>
    <style:style style:name="P24" style:family="paragraph" style:parent-style-name="Heading_20_2">
      <style:text-properties officeooo:rsid="001e1d29"/>
    </style:style>
    <style:style style:name="P25" style:family="paragraph" style:parent-style-name="Heading_20_3">
      <style:text-properties officeooo:rsid="001e1d29"/>
    </style:style>
    <style:style style:name="P26" style:family="paragraph" style:parent-style-name="Text_20_body" style:list-style-name="L6">
      <style:paragraph-properties fo:margin-top="0cm" fo:margin-bottom="0cm" style:contextual-spacing="false"/>
      <style:text-properties officeooo:rsid="001e1d29"/>
    </style:style>
    <style:style style:name="P27" style:family="paragraph" style:parent-style-name="Text_20_body" style:list-style-name="L6">
      <style:text-properties officeooo:rsid="001e1d29"/>
    </style:style>
    <style:style style:name="P28" style:family="paragraph" style:parent-style-name="Text_20_body" style:list-style-name="L7">
      <style:paragraph-properties fo:margin-top="0cm" fo:margin-bottom="0cm" style:contextual-spacing="false"/>
      <style:text-properties officeooo:rsid="001e1d29"/>
    </style:style>
    <style:style style:name="P29" style:family="paragraph" style:parent-style-name="Text_20_body" style:list-style-name="L7">
      <style:text-properties officeooo:rsid="001e1d29"/>
    </style:style>
    <style:style style:name="P30" style:family="paragraph" style:parent-style-name="Heading_20_4">
      <style:text-properties officeooo:rsid="001e1d29"/>
    </style:style>
    <style:style style:name="P31" style:family="paragraph" style:parent-style-name="Text_20_body" style:list-style-name="L8">
      <style:paragraph-properties fo:margin-top="0cm" fo:margin-bottom="0cm" style:contextual-spacing="false"/>
      <style:text-properties officeooo:rsid="001e1d29"/>
    </style:style>
    <style:style style:name="P32" style:family="paragraph" style:parent-style-name="Text_20_body" style:list-style-name="L8">
      <style:text-properties officeooo:rsid="001e1d29"/>
    </style:style>
    <style:style style:name="P33" style:family="paragraph" style:parent-style-name="Text_20_body" style:list-style-name="L9">
      <style:paragraph-properties fo:margin-top="0cm" fo:margin-bottom="0cm" style:contextual-spacing="false"/>
      <style:text-properties officeooo:rsid="001e1d29"/>
    </style:style>
    <style:style style:name="P34" style:family="paragraph" style:parent-style-name="Text_20_body" style:list-style-name="L9">
      <style:text-properties officeooo:rsid="001e1d29"/>
    </style:style>
    <style:style style:name="P35" style:family="paragraph" style:parent-style-name="Text_20_body" style:list-style-name="L10">
      <style:paragraph-properties fo:margin-top="0cm" fo:margin-bottom="0cm" style:contextual-spacing="false"/>
      <style:text-properties officeooo:rsid="001e1d29"/>
    </style:style>
    <style:style style:name="P36" style:family="paragraph" style:parent-style-name="Text_20_body" style:list-style-name="L10">
      <style:text-properties officeooo:rsid="001e1d29"/>
    </style:style>
    <style:style style:name="P37" style:family="paragraph" style:parent-style-name="Quotations">
      <style:text-properties officeooo:rsid="001e1d29"/>
    </style:style>
    <style:style style:name="P38" style:family="paragraph" style:parent-style-name="Text_20_body" style:list-style-name="L11">
      <style:paragraph-properties fo:margin-top="0cm" fo:margin-bottom="0cm" style:contextual-spacing="false"/>
      <style:text-properties officeooo:rsid="001e1d29"/>
    </style:style>
    <style:style style:name="P39" style:family="paragraph" style:parent-style-name="Text_20_body" style:list-style-name="L11">
      <style:text-properties officeooo:rsid="001e1d29"/>
    </style:style>
    <style:style style:name="P40" style:family="paragraph" style:parent-style-name="Text_20_body" style:list-style-name="L12">
      <style:paragraph-properties fo:margin-top="0cm" fo:margin-bottom="0cm" style:contextual-spacing="false"/>
      <style:text-properties officeooo:rsid="001e1d29"/>
    </style:style>
    <style:style style:name="P41" style:family="paragraph" style:parent-style-name="Text_20_body" style:list-style-name="L12">
      <style:text-properties officeooo:rsid="001e1d29"/>
    </style:style>
    <style:style style:name="P42" style:family="paragraph" style:parent-style-name="Text_20_body" style:list-style-name="L13">
      <style:paragraph-properties fo:margin-top="0cm" fo:margin-bottom="0cm" style:contextual-spacing="false"/>
      <style:text-properties officeooo:rsid="001e1d29"/>
    </style:style>
    <style:style style:name="P43" style:family="paragraph" style:parent-style-name="Text_20_body" style:list-style-name="L13">
      <style:text-properties officeooo:rsid="001e1d29"/>
    </style:style>
    <style:style style:name="P44" style:family="paragraph" style:parent-style-name="Text_20_body" style:list-style-name="L14">
      <style:paragraph-properties fo:margin-top="0cm" fo:margin-bottom="0cm" style:contextual-spacing="false"/>
      <style:text-properties officeooo:rsid="001e1d29"/>
    </style:style>
    <style:style style:name="P45" style:family="paragraph" style:parent-style-name="Text_20_body" style:list-style-name="L14">
      <style:text-properties officeooo:rsid="001e1d29"/>
    </style:style>
    <style:style style:name="P46" style:family="paragraph" style:parent-style-name="Text_20_body" style:list-style-name="L15">
      <style:paragraph-properties fo:margin-top="0cm" fo:margin-bottom="0cm" style:contextual-spacing="false"/>
      <style:text-properties officeooo:rsid="001e1d29"/>
    </style:style>
    <style:style style:name="P47" style:family="paragraph" style:parent-style-name="Text_20_body" style:list-style-name="L15">
      <style:text-properties officeooo:rsid="001e1d29"/>
    </style:style>
    <style:style style:name="P48" style:family="paragraph" style:parent-style-name="Text_20_body" style:list-style-name="L16">
      <style:paragraph-properties fo:margin-top="0cm" fo:margin-bottom="0cm" style:contextual-spacing="false"/>
      <style:text-properties officeooo:rsid="001e1d29"/>
    </style:style>
    <style:style style:name="P49" style:family="paragraph" style:parent-style-name="Text_20_body" style:list-style-name="L16">
      <style:text-properties officeooo:rsid="001e1d29"/>
    </style:style>
    <style:style style:name="P50" style:family="paragraph" style:parent-style-name="Text_20_body" style:list-style-name="L17">
      <style:paragraph-properties fo:margin-top="0cm" fo:margin-bottom="0cm" style:contextual-spacing="false"/>
      <style:text-properties officeooo:rsid="001e1d29"/>
    </style:style>
    <style:style style:name="P51" style:family="paragraph" style:parent-style-name="Text_20_body" style:list-style-name="L17">
      <style:text-properties officeooo:rsid="001e1d29"/>
    </style:style>
    <style:style style:name="P52" style:family="paragraph" style:parent-style-name="Text_20_body" style:list-style-name="L18">
      <style:paragraph-properties fo:margin-top="0cm" fo:margin-bottom="0cm" style:contextual-spacing="false"/>
      <style:text-properties officeooo:rsid="001e1d29"/>
    </style:style>
    <style:style style:name="P53" style:family="paragraph" style:parent-style-name="Text_20_body" style:list-style-name="L18">
      <style:text-properties officeooo:rsid="001e1d29"/>
    </style:style>
    <style:style style:name="P54" style:family="paragraph" style:parent-style-name="Text_20_body" style:list-style-name="L19">
      <style:paragraph-properties fo:margin-top="0cm" fo:margin-bottom="0cm" style:contextual-spacing="false"/>
      <style:text-properties officeooo:rsid="001e1d29"/>
    </style:style>
    <style:style style:name="P55" style:family="paragraph" style:parent-style-name="Text_20_body" style:list-style-name="L19">
      <style:text-properties officeooo:rsid="001e1d29"/>
    </style:style>
    <style:style style:name="P56" style:family="paragraph" style:parent-style-name="Text_20_body" style:list-style-name="L20">
      <style:paragraph-properties fo:margin-top="0cm" fo:margin-bottom="0cm" style:contextual-spacing="false"/>
      <style:text-properties officeooo:rsid="001e1d29"/>
    </style:style>
    <style:style style:name="P57" style:family="paragraph" style:parent-style-name="Text_20_body" style:list-style-name="L20">
      <style:text-properties officeooo:rsid="001e1d29"/>
    </style:style>
    <style:style style:name="T1" style:family="text">
      <style:text-properties officeooo:rsid="001e1d2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7 seções de monetização </text:span></text:p>
      <text:p text:style-name="Text_20_body"><text:span text:style-name="Strong_20_Emphasis"/></text:p>
      <text:p text:style-name="Text_20_body"><text:span text:style-name="Strong_20_Emphasis">Seções de alta conversão para afiliados:</text:span></text:p>
      <text:p text:style-name="Text_20_body"><text:span text:style-name="Strong_20_Emphasis">1. "Melhor Preço Agora"</text:span> — Um buscador/comparador de preços com botões "Ver Oferta" que levam direto para o link de afiliado. É a seção com maior taxa de clique em sites tech.</text:p>
      <text:p text:style-name="Text_20_body"><text:span text:style-name="Strong_20_Emphasis">2. "Kits Tech Recomendados"</text:span> — Curadoria de combos temáticos ("Kit Home Office IA", "Setup Gamer 2026", "Kit Creator"). Cada item com botão de compra afiliado. Funciona muito bem porque aumenta o ticket médio.</text:p>
      <text:p text:style-name="Text_20_body"><text:span text:style-name="Strong_20_Emphasis">3. "Oferta Relâmpago"</text:span> — Seção com contador regressivo mostrando ofertas do dia da Amazon/Mercado Livre. Cria urgência e aumenta conversão.</text:p>
      <text:p text:style-name="Text_20_body"><text:span text:style-name="Strong_20_Emphasis">4. "Top 5 da Semana"</text:span> — Ranking semanal dos produtos mais buscados com badge de posição, nota e botão de compra. Fácil de atualizar e muito compartilhável.</text:p>
      <text:p text:style-name="Text_20_body"><text:span text:style-name="Strong_20_Emphasis">5. "Guias de Compra"</text:span> — Artigos do tipo "Melhor smartphone até R$3.000 em 2026". É o formato que mais converte em afiliados tech porque o usuário já está em modo de decisão de compra.</text:p>
      <text:p text:style-name="Text_20_body"><text:span text:style-name="Strong_20_Emphasis">6. "Alertas de Queda de Preço"</text:span> — Cadastro de e-mail para receber notificação quando um produto cai de preço. Constrói lista e direciona tráfego qualificado.</text:p>
      <text:p text:style-name="Text_20_body"><text:span text:style-name="Strong_20_Emphasis">7. Sidebar/Banner lateral flutuante</text:span> — Um painel lateral que aparece ao rolar a página com produto em destaque + preço + botão de compra. Não interrompe a leitura mas está sempre visível.</text:p>
      <text:p text:style-name="Standard"/>
      <text:p text:style-name="Standard"/>
      <text:p text:style-name="Standard"/>
      <text:p text:style-name="Standard"/>
      <text:p text:style-name="P1">Coloque como seções de monetização para que eu disponibilize links desses produtos no meu afiliados</text:p>
      <text:p text:style-name="Standard"/>
      <text:p text:style-name="Text_20_body"><text:span text:style-name="Strong_20_Emphasis">⚡ Comparação de Produtos</text:span></text:p>
      <text:list text:style-name="L1">
        <text:list-item>
          <text:p text:style-name="P2">Filtre entre <text:span text:style-name="Strong_20_Emphasis">Smartphones</text:span>, <text:span text:style-name="Strong_20_Emphasis">Wearables</text:span> e <text:span text:style-name="Strong_20_Emphasis">Laptops IA</text:span> com um clique </text:p>
        </text:list-item>
        <text:list-item>
          <text:p text:style-name="P2">Cada produto tem barras de especificações animadas com pontuação visual </text:p>
        </text:list-item>
        <text:list-item>
          <text:p text:style-name="P2">O melhor produto da categoria recebe o selo "Melhor escolha" com destaque em ciano </text:p>
        </text:list-item>
        <text:list-item>
          <text:p text:style-name="P3">Veredicto editorial do Tech Turbo ao final </text:p>
        </text:list-item>
      </text:list>
      <text:p text:style-name="Text_20_body"><text:span text:style-name="Strong_20_Emphasis">🚀 Lançamentos</text:span></text:p>
      <text:list text:style-name="L2">
        <text:list-item>
          <text:p text:style-name="P4">Cards com foto, status colorido (<text:span text:style-name="Strong_20_Emphasis">Disponível Agora</text:span> / <text:span text:style-name="Strong_20_Emphasis">Em Breve</text:span> / <text:span text:style-name="Strong_20_Emphasis">Rumor</text:span>) com dot piscando </text:p>
        </text:list-item>
        <text:list-item>
          <text:p text:style-name="P4">Tags de categorias técnicas em cada produto </text:p>
        </text:list-item>
        <text:list-item>
          <text:p text:style-name="P5"><text:span text:style-name="Strong_20_Emphasis">Linha do tempo</text:span> com os lançamentos organizados por trimestre (Q1–Q4 2026</text:p>
        </text:list-item>
      </text:list>
      <text:p text:style-name="Standard"/>
      <text:p text:style-name="Standard"/>
      <text:p text:style-name="P6">gostei das 7, coloque as 7 no index, lembre de colocar imagens ilustrativas e inovadoras</text:p>
      <text:p text:style-name="P7"/>
      <text:p text:style-name="P7"/>
      <text:p text:style-name="P7"><text:soft-page-break/></text:p>
      <text:p text:style-name="P8">reescreva esse index.html, adicionando e posicionando em lugares estratégicos essas 7 seções de alta conversão para afiliados, Coloque como seções de monetização para que eu disponibilize links desses produtos no meu afiliados, crie também uma seção para Comparação de Produtos</text:p>
      <text:list text:style-name="L3">
        <text:list-item>
          <text:p text:style-name="P9">Filtre entre Smartphones, Wearables e Laptops IA com um clique</text:p>
        </text:list-item>
        <text:list-item>
          <text:p text:style-name="P9">Cada produto tem barras de especificações animadas com pontuação visual</text:p>
        </text:list-item>
        <text:list-item>
          <text:p text:style-name="P9">O melhor produto da categoria recebe o selo "Melhor escolha" com destaque em ciano</text:p>
        </text:list-item>
        <text:list-item>
          <text:p text:style-name="P10">Veredicto editorial do Tech Turbo ao final. e outra seção para lançamentos Lançamentos</text:p>
        </text:list-item>
        <text:list-item>
          <text:p text:style-name="P9">Cards com foto, status colorido (Disponível Agora / Em Breve / Rumor) com dot piscando</text:p>
        </text:list-item>
        <text:list-item>
          <text:p text:style-name="P9">Tags de categorias técnicas em cada produto</text:p>
        </text:list-item>
        <text:list-item>
          <text:p text:style-name="P10">Linha do tempo com os lançamentos organizados por trimestre</text:p>
        </text:list-item>
      </text:list>
      <text:p text:style-name="P11">Lembre de adicionar imagens em cada seção, imagens inovadoras, tecnologicas e futuristas, correlacionadas a cada seção.</text:p>
      <text:p text:style-name="P7"/>
      <text:p text:style-name="P7"/>
      <text:p text:style-name="P7"/>
      <text:p text:style-name="P12">Reorganize na seguinte sequencia:<text:line-break/><text:line-break/><text:span text:style-name="T1"><text:line-break/>- o mundo que está chegando</text:span></text:p>
      <text:p text:style-name="P12">- <text:span text:style-name="T1">Comparativo techturbo</text:span></text:p>
      <text:p text:style-name="P12">- <text:span text:style-name="T1">Lançamentos que chegam</text:span></text:p>
      <text:p text:style-name="P12">- <text:span text:style-name="T1">linha do tempo</text:span></text:p>
      <text:p text:style-name="P12">- <text:span text:style-name="T1">reviews completos</text:span></text:p>
      <text:p text:style-name="P12">- <text:span text:style-name="T1">ferramentas de ia que usamos</text:span></text:p>
      <text:p text:style-name="P12">- <text:span text:style-name="T1">newsletter</text:span></text:p>
      <text:p text:style-name="P12">- <text:span text:style-name="T1">top picks da redação</text:span></text:p>
      <text:p text:style-name="P12">- <text:span text:style-name="T1">melhores ofertas de hoje</text:span></text:p>
      <text:p text:style-name="P12">- <text:span text:style-name="T1">ultimas publicações</text:span></text:p>
      <text:p text:style-name="P13">- pick da seman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15"/>
      <text:p text:style-name="P16">estou criando um site estilo blog. tenho a intenção de monetizar, porém não quero que fique descaradamente, tipo uma loja, quero que esteja integrado aos artigos, comparativos, de forma mais sutil. defina qual sequencia melhor fica organizado tendo em vista que atualmente o site possui as seguintes seções: </text:p>
      <text:p text:style-name="P15">reescreva levando em conta as seguintes informações: Para um blog de tecnologia com monetização mais “invisível” e integrada ao conteúdo, o segredo é organizar o site em camadas:</text:p>
      <text:p text:style-name="P14"/>
      <text:p text:style-name="P14"/>
      <text:p text:style-name="P14">Para um blog de tecnologia com monetização mais “invisível” e integrada ao conteúdo, o segredo é organizar o site em camadas:</text:p>
      <text:list text:style-name="L4">
        <text:list-item>
          <text:p text:style-name="P17"><text:span text:style-name="Strong_20_Emphasis">Conteúdo editorial forte primeiro</text:span> </text:p>
        </text:list-item>
        <text:list-item>
          <text:p text:style-name="P17"><text:span text:style-name="Strong_20_Emphasis">Descoberta e autoridade no meio</text:span> </text:p>
        </text:list-item>
        <text:list-item>
          <text:p text:style-name="P17"><text:span text:style-name="Strong_20_Emphasis">Monetização contextual depois</text:span> </text:p>
        </text:list-item>
        <text:list-item>
          <text:p text:style-name="P18"><text:span text:style-name="Strong_20_Emphasis">Conversão suave no final</text:span> </text:p>
        </text:list-item>
      </text:list>
      <text:p text:style-name="P19">Hoje suas seções têm boas ideias, mas estão misturando:</text:p>
      <text:list text:style-name="L5">
        <text:list-item>
          <text:p text:style-name="P20">editorial, </text:p>
        </text:list-item>
        <text:list-item>
          <text:p text:style-name="P20">tendências, </text:p>
        </text:list-item>
        <text:list-item>
          <text:p text:style-name="P20">afiliados, </text:p>
        </text:list-item>
        <text:list-item>
          <text:p text:style-name="P20">reviews, </text:p>
        </text:list-item>
        <text:list-item>
          <text:p text:style-name="P21">ofertas. </text:p>
        </text:list-item>
      </text:list>
      <text:p text:style-name="P19">Isso pode deixar o visitante sem entender rapidamente a estrutura do site.</text:p>
      <text:p text:style-name="P19">Minha recomendação seria reorganizar assim:</text:p>
      <text:p text:style-name="P22"/>
      <text:h text:style-name="P23" text:outline-level="1">Estrutura ideal da Home do TechTurbo</text:h>
      <text:h text:style-name="P24" text:outline-level="2">1. HERO PRINCIPAL (Topo do site)</text:h>
      <text:h text:style-name="P25" text:outline-level="3">Destaque principal</text:h>
      <text:p text:style-name="P19"><text:span text:style-name="Strong_20_Emphasis">“O mundo que está chegando”</text:span></text:p>
      <text:list text:style-name="L6">
        <text:list-item>
          <text:p text:style-name="P26">artigo grande em destaque </text:p>
        </text:list-item>
        <text:list-item>
          <text:p text:style-name="P26">visual futurista </text:p>
        </text:list-item>
        <text:list-item>
          <text:p text:style-name="P27">gera identidade forte para a marca </text:p>
        </text:list-item>
      </text:list>
      <text:p text:style-name="P19"><text:soft-page-break/>👉 Isso posiciona o TechTurbo como:<text:line-break/>“não somos só um site de promoções”</text:p>
      <text:p text:style-name="P22"/>
      <text:h text:style-name="P24" text:outline-level="2">2. ÚLTIMAS PUBLICAÇÕES</text:h>
      <text:h text:style-name="P25" text:outline-level="3">“Últimas publicações”</text:h>
      <text:p text:style-name="P19">Logo abaixo do destaque principal.</text:p>
      <text:p text:style-name="P19">Misture:</text:p>
      <text:list text:style-name="L7">
        <text:list-item>
          <text:p text:style-name="P28">IA </text:p>
        </text:list-item>
        <text:list-item>
          <text:p text:style-name="P28">gadgets </text:p>
        </text:list-item>
        <text:list-item>
          <text:p text:style-name="P28">apps </text:p>
        </text:list-item>
        <text:list-item>
          <text:p text:style-name="P28">tendências </text:p>
        </text:list-item>
        <text:list-item>
          <text:p text:style-name="P29">produtividade </text:p>
        </text:list-item>
      </text:list>
      <text:p text:style-name="P19">👉 Mantém o site vivo e atualizado.</text:p>
      <text:p text:style-name="P22"/>
      <text:h text:style-name="P24" text:outline-level="2">3. BLOCOS DE AUTORIDADE</text:h>
      <text:p text:style-name="P19">Aqui entram conteúdos que geram confiança.</text:p>
      <text:h text:style-name="P25" text:outline-level="3">Ordem ideal:</text:h>
      <text:h text:style-name="P30" text:outline-level="4">Comparativo TechTurbo</text:h>
      <text:p text:style-name="P19">(EXCELENTE para monetização sutil)</text:p>
      <text:p text:style-name="P19">Exemplo:</text:p>
      <text:list text:style-name="L8">
        <text:list-item>
          <text:p text:style-name="P31">ChatGPT vs Gemini </text:p>
        </text:list-item>
        <text:list-item>
          <text:p text:style-name="P31">Melhor notebook até R$ 3 mil </text:p>
        </text:list-item>
        <text:list-item>
          <text:p text:style-name="P32">Melhor IA para estudar </text:p>
        </text:list-item>
      </text:list>
      <text:p text:style-name="P19">👉 Aqui os links afiliados entram naturalmente.</text:p>
      <text:p text:style-name="P22"/>
      <text:h text:style-name="P30" text:outline-level="4">Reviews completos</text:h>
      <text:p text:style-name="P19">Depois dos comparativos.</text:p>
      <text:p text:style-name="P19">Porque:</text:p>
      <text:list text:style-name="L9">
        <text:list-item>
          <text:p text:style-name="P33">comparativo gera curiosidade </text:p>
        </text:list-item>
        <text:list-item>
          <text:p text:style-name="P34">review gera decisão de compra </text:p>
        </text:list-item>
      </text:list>
      <text:p text:style-name="P19">👉 Estrutura perfeita para afiliados.</text:p>
      <text:p text:style-name="P22"/>
      <text:h text:style-name="P24" text:outline-level="2"><text:soft-page-break/>4. MONETIZAÇÃO “DISFARÇADA”</text:h>
      <text:p text:style-name="P19">Aqui entram os blocos comerciais, mas sem parecer marketplace.</text:p>
      <text:h text:style-name="P25" text:outline-level="3">Top Picks da Redação</text:h>
      <text:p text:style-name="P19">Esse nome é MUITO bom.</text:p>
      <text:p text:style-name="P19">Coloque:</text:p>
      <text:list text:style-name="L10">
        <text:list-item>
          <text:p text:style-name="P35">3 a 6 produtos </text:p>
        </text:list-item>
        <text:list-item>
          <text:p text:style-name="P35">design minimalista </text:p>
        </text:list-item>
        <text:list-item>
          <text:p text:style-name="P36">“usamos/testamos/recomendamos” </text:p>
        </text:list-item>
      </text:list>
      <text:p text:style-name="P19">👉 Parece curadoria editorial, não loja.</text:p>
      <text:p text:style-name="P22"/>
      <text:h text:style-name="P25" text:outline-level="3">Pick da Semana</text:h>
      <text:p text:style-name="P19">Apenas UM produto em destaque.</text:p>
      <text:p text:style-name="P19">Muito forte para conversão.</text:p>
      <text:p text:style-name="P19">Exemplo:</text:p>
      <text:p text:style-name="P37">“O gadget que mais surpreendeu nossa equipe essa semana.”</text:p>
      <text:p text:style-name="P19">👉 Altíssima taxa de clique sem parecer anúncio.</text:p>
      <text:p text:style-name="P22"/>
      <text:h text:style-name="P24" text:outline-level="2">5. CONTEÚDO FUTURISTA / ENGAJAMENTO</text:h>
      <text:h text:style-name="P25" text:outline-level="3">Lançamentos que chegam</text:h>
      <text:p text:style-name="P19">Ótimo para:</text:p>
      <text:list text:style-name="L11">
        <text:list-item>
          <text:p text:style-name="P38">SEO </text:p>
        </text:list-item>
        <text:list-item>
          <text:p text:style-name="P38">hype </text:p>
        </text:list-item>
        <text:list-item>
          <text:p text:style-name="P39">tráfego recorrente </text:p>
        </text:list-item>
      </text:list>
      <text:p text:style-name="P19">Pode incluir:</text:p>
      <text:list text:style-name="L12">
        <text:list-item>
          <text:p text:style-name="P40">“iPhone 18” </text:p>
        </text:list-item>
        <text:list-item>
          <text:p text:style-name="P40">“Tesla Phone” </text:p>
        </text:list-item>
        <text:list-item>
          <text:p text:style-name="P40">“óculos de IA” </text:p>
        </text:list-item>
        <text:list-item>
          <text:p text:style-name="P41">“robôs domésticos” </text:p>
        </text:list-item>
      </text:list>
      <text:p text:style-name="P22"/>
      <text:h text:style-name="P25" text:outline-level="3">Linha do Tempo</text:h>
      <text:p text:style-name="P19">Muito boa ideia, mas ela funciona melhor:</text:p>
      <text:list text:style-name="L13">
        <text:list-item>
          <text:p text:style-name="P42">como página própria </text:p>
        </text:list-item>
        <text:list-item>
          <text:p text:style-name="P43"><text:soft-page-break/>ou seção interativa menor </text:p>
        </text:list-item>
      </text:list>
      <text:p text:style-name="P19">Sugestão:<text:line-break/>“Evolução da IA”<text:line-break/>“Evolução dos celulares”<text:line-break/>“Linha do tempo da OpenAI”</text:p>
      <text:p text:style-name="P19">👉 Excelente para retenção.</text:p>
      <text:p text:style-name="P22"/>
      <text:h text:style-name="P24" text:outline-level="2">6. UTILIDADE (MUITO FORTE PARA SEO)</text:h>
      <text:h text:style-name="P25" text:outline-level="3">Ferramentas de IA que usamos</text:h>
      <text:p text:style-name="P19">Essa seção pode virar um dos maiores ativos do site.</text:p>
      <text:p text:style-name="P19">Porque:</text:p>
      <text:list text:style-name="L14">
        <text:list-item>
          <text:p text:style-name="P44">gera confiança </text:p>
        </text:list-item>
        <text:list-item>
          <text:p text:style-name="P44">tem SEO forte </text:p>
        </text:list-item>
        <text:list-item>
          <text:p text:style-name="P44">aceita afiliados SaaS </text:p>
        </text:list-item>
        <text:list-item>
          <text:p text:style-name="P45">gera recorrência </text:p>
        </text:list-item>
      </text:list>
      <text:p text:style-name="P19">Exemplo:</text:p>
      <text:list text:style-name="L15">
        <text:list-item>
          <text:p text:style-name="P46">ChatGPT </text:p>
        </text:list-item>
        <text:list-item>
          <text:p text:style-name="P46">Notion AI </text:p>
        </text:list-item>
        <text:list-item>
          <text:p text:style-name="P46">Claude </text:p>
        </text:list-item>
        <text:list-item>
          <text:p text:style-name="P46">Canva </text:p>
        </text:list-item>
        <text:list-item>
          <text:p text:style-name="P47">Runway </text:p>
        </text:list-item>
      </text:list>
      <text:p text:style-name="P19">Mas faça em formato:</text:p>
      <text:list text:style-name="L16">
        <text:list-item>
          <text:p text:style-name="P48">“o que usamos na redação”<text:line-break/>e não: </text:p>
        </text:list-item>
        <text:list-item>
          <text:p text:style-name="P49">“lista de ferramentas” </text:p>
        </text:list-item>
      </text:list>
      <text:p text:style-name="P19">👉 Parece experiência real.</text:p>
      <text:p text:style-name="P22"/>
      <text:h text:style-name="P24" text:outline-level="2">7. OFERTAS (mais abaixo)</text:h>
      <text:h text:style-name="P25" text:outline-level="3">Melhores ofertas de hoje</text:h>
      <text:p text:style-name="P19">Deixe MAIS EMBAIXO.</text:p>
      <text:p text:style-name="P19">Porque:</text:p>
      <text:list text:style-name="L17">
        <text:list-item>
          <text:p text:style-name="P50">quem quer oferta vai procurar </text:p>
        </text:list-item>
        <text:list-item>
          <text:p text:style-name="P51">quem chega novo não deve achar que o site é só afiliado </text:p>
        </text:list-item>
      </text:list>
      <text:p text:style-name="P19">Isso melhora:</text:p>
      <text:list text:style-name="L18">
        <text:list-item>
          <text:p text:style-name="P52"><text:soft-page-break/>branding </text:p>
        </text:list-item>
        <text:list-item>
          <text:p text:style-name="P52">tempo de permanência </text:p>
        </text:list-item>
        <text:list-item>
          <text:p text:style-name="P53">confiança </text:p>
        </text:list-item>
      </text:list>
      <text:p text:style-name="P22"/>
      <text:h text:style-name="P24" text:outline-level="2">8. CAPTURA DE AUDIÊNCIA</text:h>
      <text:h text:style-name="P25" text:outline-level="3">Newsletter</text:h>
      <text:p text:style-name="P19">No final da home + popup leve.</text:p>
      <text:p text:style-name="P19">Sugestão de posicionamento:<text:line-break/>Depois de um conteúdo muito bom.</text:p>
      <text:p text:style-name="P19">Exemplo:</text:p>
      <text:p text:style-name="P37">“Receba as tecnologias que vão mudar o mundo antes de todo mundo.”</text:p>
      <text:p text:style-name="P19">👉 Muito mais forte que:<text:line-break/>“Assine nossa newsletter.”</text:p>
      <text:p text:style-name="P22"/>
      <text:h text:style-name="P23" text:outline-level="1">Ordem final ideal</text:h>
      <text:h text:style-name="P24" text:outline-level="2">HOME</text:h>
      <text:list text:style-name="L19">
        <text:list-item>
          <text:p text:style-name="P54">O mundo que está chegando </text:p>
        </text:list-item>
        <text:list-item>
          <text:p text:style-name="P54">Últimas publicações </text:p>
        </text:list-item>
        <text:list-item>
          <text:p text:style-name="P54">Comparativo TechTurbo </text:p>
        </text:list-item>
        <text:list-item>
          <text:p text:style-name="P54">Reviews completos </text:p>
        </text:list-item>
        <text:list-item>
          <text:p text:style-name="P54">Top Picks da Redação </text:p>
        </text:list-item>
        <text:list-item>
          <text:p text:style-name="P54">Pick da Semana </text:p>
        </text:list-item>
        <text:list-item>
          <text:p text:style-name="P54">Lançamentos que chegam </text:p>
        </text:list-item>
        <text:list-item>
          <text:p text:style-name="P54">Ferramentas de IA que usamos </text:p>
        </text:list-item>
        <text:list-item>
          <text:p text:style-name="P54">Linha do Tempo </text:p>
        </text:list-item>
        <text:list-item>
          <text:p text:style-name="P54">Melhores ofertas de hoje </text:p>
        </text:list-item>
        <text:list-item>
          <text:p text:style-name="P55">Newsletter </text:p>
        </text:list-item>
      </text:list>
      <text:p text:style-name="P22"/>
      <text:h text:style-name="P23" text:outline-level="1">O que essa estrutura faz psicologicamente</text:h>
      <text:p text:style-name="P19">Ela cria:</text:p>
      <text:h text:style-name="P25" text:outline-level="3">1. Autoridade primeiro</text:h>
      <text:p text:style-name="P19">“Esse site entende tecnologia.”</text:p>
      <text:h text:style-name="P25" text:outline-level="3"><text:soft-page-break/>2. Confiança depois</text:h>
      <text:p text:style-name="P19">“Eles realmente testam as coisas.”</text:p>
      <text:h text:style-name="P25" text:outline-level="3">3. Conversão por consequência</text:h>
      <text:p text:style-name="P19">“Já que eles entendem… vou comprar pelo link deles.”</text:p>
      <text:p text:style-name="P19">Isso é exatamente como:</text:p>
      <text:list text:style-name="L20">
        <text:list-item>
          <text:p text:style-name="P56">The Verge </text:p>
        </text:list-item>
        <text:list-item>
          <text:p text:style-name="P56">TechCrunch </text:p>
        </text:list-item>
        <text:list-item>
          <text:p text:style-name="P56">Tom's Guide </text:p>
        </text:list-item>
        <text:list-item>
          <text:p text:style-name="P57">Wirecutter<text:line-break/>monetizam sem parecer lojas. </text:p>
        </text:list-item>
      </text:list>
      <text:p text:style-name="P19">E o mais importante:<text:line-break/>o Google tende a valorizar mais sites com perfil editorial do que páginas puramente afiliadas.</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thropic Sans" svg:font-family="'Anthropic Sans', system-ui, 'Segoe UI', Robo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9T11:01:49.702605400</meta:creation-date>
    <meta:editing-duration>PT2M5S</meta:editing-duration>
    <meta:editing-cycles>3</meta:editing-cycles>
    <meta:generator>LibreOffice/25.8.5.2$Windows_X86_64 LibreOffice_project/9c8b85f387cc00a89945a79c9e6239f32e450ac2</meta:generator>
    <dc:date>2026-05-09T11:48:45.659466700</dc:date>
    <meta:document-statistic meta:table-count="0" meta:image-count="0" meta:object-count="0" meta:page-count="8" meta:paragraph-count="183" meta:word-count="1213" meta:character-count="7270" meta:non-whitespace-character-count="6238"/>
  </office:meta>
</office:document-meta>
</file>